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d642"/>
    </style:style>
    <style:style style:name="P2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font-size="13pt" officeooo:rsid="001493e6" officeooo:paragraph-rsid="001493e6" style:font-size-asian="13pt" style:font-size-complex="13pt"/>
    </style:style>
    <style:style style:name="P4" style:family="paragraph" style:parent-style-name="Preformatted_20_Text">
      <style:text-properties fo:font-size="13pt" officeooo:rsid="001493e6" officeooo:paragraph-rsid="001493e6" style:font-size-asian="11.3500003814697pt" style:font-size-complex="13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3pt" fo:font-weight="bold" officeooo:rsid="001493e6" officeooo:paragraph-rsid="001493e6" style:font-size-asian="11.3500003814697pt" style:font-weight-asian="bold" style:font-size-complex="13pt" style:font-weight-complex="bold"/>
    </style:style>
    <style:style style:name="P7" style:family="paragraph" style:parent-style-name="Preformatted_20_Text">
      <style:text-properties fo:font-size="15pt" fo:font-weight="bold" officeooo:rsid="00169170" officeooo:paragraph-rsid="00169170" style:font-size-asian="13.1000003814697pt" style:font-weight-asian="bold" style:font-size-complex="15pt" style:font-weight-complex="bold"/>
    </style:style>
    <style:style style:name="P8" style:family="paragraph" style:parent-style-name="Preformatted_20_Text">
      <style:text-properties fo:font-size="12pt" fo:font-weight="normal" officeooo:rsid="00169170" officeooo:paragraph-rsid="00169170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fo:font-size="12pt" fo:font-weight="normal" officeooo:rsid="001792db" officeooo:paragraph-rsid="001792db" style:font-size-asian="10.5pt" style:font-weight-asian="normal" style:font-size-complex="12pt" style:font-weight-complex="normal"/>
    </style:style>
    <style:style style:name="P10" style:family="paragraph" style:parent-style-name="Preformatted_20_Text">
      <style:text-properties fo:font-size="15pt" fo:font-weight="bold" officeooo:rsid="001792db" officeooo:paragraph-rsid="001792db" style:font-size-asian="13.1000003814697pt" style:font-weight-asian="bold" style:font-size-complex="15pt" style:font-weight-complex="bold"/>
    </style:style>
    <style:style style:name="P11" style:family="paragraph" style:parent-style-name="Preformatted_20_Text">
      <style:text-properties fo:font-size="13pt" fo:font-weight="normal" officeooo:rsid="001792db" officeooo:paragraph-rsid="001792db" style:font-size-asian="11.3500003814697pt" style:font-weight-asian="normal" style:font-size-complex="13pt" style:font-weight-complex="normal"/>
    </style:style>
    <style:style style:name="T1" style:family="text">
      <style:text-properties fo:font-size="26pt" officeooo:rsid="0012d642" style:font-size-asian="22.75pt" style:font-size-complex="26pt"/>
    </style:style>
    <style:style style:name="T2" style:family="text">
      <style:text-properties officeooo:rsid="001493e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2d642" style:font-size-asian="12pt" style:font-weight-asian="bold" style:font-size-complex="12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2pt" officeooo:rsid="001493e6" style:font-size-asian="12pt" style:font-size-complex="12pt"/>
    </style:style>
    <style:style style:name="T8" style:family="text">
      <style:text-properties fo:font-size="12pt" officeooo:rsid="0012d642" style:font-size-asian="12pt" style:font-size-complex="12pt"/>
    </style:style>
    <style:style style:name="T9" style:family="text">
      <style:text-properties fo:font-size="12pt" officeooo:rsid="001792db" style:font-size-asian="12pt" style:font-size-complex="12pt"/>
    </style:style>
    <style:style style:name="T10" style:family="text">
      <style:text-properties officeooo:rsid="0012d642"/>
    </style:style>
    <style:style style:name="T11" style:family="text">
      <style:text-properties fo:font-size="13pt" officeooo:rsid="0012d642" style:font-size-asian="13pt" style:font-size-complex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officeooo:rsid="001493e6" style:font-size-asian="10.5pt" style:font-size-complex="12pt"/>
    </style:style>
    <style:style style:name="T14" style:family="text">
      <style:text-properties fo:font-size="12pt" fo:font-weight="bold" officeooo:rsid="001493e6" style:font-size-asian="10.5pt" style:font-weight-asian="bold" style:font-size-complex="12pt" style:font-weight-complex="bold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1493e6" style:font-size-asian="12pt" style:font-weight-asian="bold" style:font-size-complex="12pt" style:font-weight-complex="bold"/>
    </style:style>
    <style:style style:name="T17" style:family="text">
      <style:text-properties fo:font-weight="bold" officeooo:rsid="001493e6" style:font-weight-asian="bold" style:font-weight-complex="bold"/>
    </style:style>
    <style:style style:name="T18" style:family="text">
      <style:text-properties officeooo:rsid="0016af2d"/>
    </style:style>
    <style:style style:name="T19" style:family="text">
      <style:text-properties fo:font-size="12pt" fo:font-weight="normal" officeooo:rsid="0016af2d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Alvaro Gabriel Lima Ramos</text:span></text:p>
      <text:p text:style-name="Preformatted_20_Text"/>
      <text:p text:style-name="Preformatted_20_Text"><text:s text:c="3"/><text:span text:style-name="T2">*</text:span> 📞 <text:span text:style-name="T3">Telefone: </text:span><text:span text:style-name="T4">(</text:span><text:span text:style-name="T5">81</text:span><text:span text:style-name="T4">) 9</text:span><text:span text:style-name="T5">88466258</text:span></text:p>
      <text:p text:style-name="Preformatted_20_Text"/>
      <text:p text:style-name="Preformatted_20_Text"><text:s text:c="3"/><text:span text:style-name="T2">* </text:span>✉️ <text:span text:style-name="T3">E-mail: </text:span><text:span text:style-name="T5">alvarogabriel336@gmail.com</text:span></text:p>
      <text:p text:style-name="Preformatted_20_Text"/>
      <text:p text:style-name="Preformatted_20_Text"><text:s text:c="3"/><text:span text:style-name="T2">*</text:span> 📍 <text:span text:style-name="T3">Localização: </text:span><text:span text:style-name="T5">Abreu e Lima - Pernambuco</text:span></text:p>
      <text:p text:style-name="Preformatted_20_Text"><text:s text:c="4"/></text:p>
      <text:p text:style-name="Preformatted_20_Text">🎯 <text:span text:style-name="T6">Objetivo Profissional</text:span></text:p>
      <text:p text:style-name="Preformatted_20_Text"/>
      <text:p text:style-name="Preformatted_20_Text"><text:span text:style-name="T7">* </text:span><text:span text:style-name="T8">O meu objetivo como profissional é permancer evoluindo constatemente na área que estou </text:span><text:span text:style-name="T9">ou possa esta atuando</text:span><text:span text:style-name="T8">.Essa</text:span><text:span text:style-name="T10"> </text:span><text:span text:style-name="T11">é minha principal contruibuição para a empresa.</text:span></text:p>
      <text:p text:style-name="Preformatted_20_Text"/>
      <text:p text:style-name="P2">💼 Experiência Profissional</text:p>
      <text:p text:style-name="P2"/>
      <text:p text:style-name="P3">* Nome da empresa: <text:span text:style-name="T12">NutriHouse</text:span></text:p>
      <text:p text:style-name="Preformatted_20_Text"/>
      <text:p text:style-name="Preformatted_20_Text"><text:span text:style-name="T13">* Cargo:</text:span><text:span text:style-name="T14"> Auxiliar de serviços gerais</text:span><text:span text:style-name="T12"> </text:span></text:p>
      <text:p text:style-name="Preformatted_20_Text"/>
      <text:p text:style-name="Preformatted_20_Text"><text:span text:style-name="T7">* </text:span><text:span text:style-name="T3">Período</text:span>:<text:span text:style-name="T15"> </text:span><text:span text:style-name="T14">02 de junho de 2025</text:span><text:span text:style-name="T15"> </text:span>– <text:span text:style-name="T14">11 de fevereiro de 2026</text:span></text:p>
      <text:p text:style-name="Preformatted_20_Text"/>
      <text:p text:style-name="Preformatted_20_Text"><text:span text:style-name="T7">* </text:span><text:span text:style-name="T3">Principais atividades</text:span>: <text:span text:style-name="T14">Responsável pela limpeza e organização geral da empresa</text:span></text:p>
      <text:p text:style-name="Preformatted_20_Text"/>
      <text:p text:style-name="P4">* Nome da empresa: <text:span text:style-name="T12">Bike moto peças</text:span></text:p>
      <text:p text:style-name="Preformatted_20_Text"/>
      <text:p text:style-name="Preformatted_20_Text"><text:span text:style-name="T7">* </text:span><text:span text:style-name="T3">Cargo</text:span>: <text:span text:style-name="T16">Balconista</text:span></text:p>
      <text:p text:style-name="Preformatted_20_Text"/>
      <text:p text:style-name="Preformatted_20_Text"><text:span text:style-name="T7">* </text:span><text:span text:style-name="T3">Período:</text:span><text:span text:style-name="T15"> </text:span><text:span text:style-name="T14">02 de março de 2026</text:span><text:span text:style-name="T15"> </text:span>– <text:span text:style-name="T14">01 de junho de 2026</text:span></text:p>
      <text:p text:style-name="Preformatted_20_Text"/>
      <text:p text:style-name="P5"><text:span text:style-name="T2">* </text:span>Principais atividades: <text:span text:style-name="T17">Responsável pelo atedimento ao cliente,conferencia e organização de estoque e fechamento de caixa.</text:span></text:p>
      <text:p text:style-name="Preformatted_20_Text"/>
      <text:p text:style-name="P2">🎓 Formação Acadêmica</text:p>
      <text:p text:style-name="P6"><text:s/></text:p>
      <text:p text:style-name="P6"><text:span text:style-name="T18">* </text:span>Ensino médio completo </text:p>
      <text:p text:style-name="Preformatted_20_Text"/>
      <text:p text:style-name="Preformatted_20_Text"><text:span text:style-name="T19">* </text:span><text:span text:style-name="T20">Instituição</text:span>: <text:span text:style-name="T16">Escola Luiz Rodolfo de Araujo</text:span></text:p>
      <text:p text:style-name="Preformatted_20_Text"/>
      <text:p text:style-name="P7">Habilidades </text:p>
      <text:p text:style-name="P7"/>
      <text:p text:style-name="P8">* Informatica</text:p>
      <text:p text:style-name="P8">* Programação</text:p>
      <text:p text:style-name="P8">* Proatividade </text:p>
      <text:p text:style-name="P9">* Atedimento ao cliente</text:p>
      <text:p text:style-name="P9">*organização de estoque e mercadorias</text:p>
      <text:p text:style-name="P9"/>
      <text:p text:style-name="P10">Informações adicionais</text:p>
      <text:p text:style-name="P10"/>
      <text:p text:style-name="P11">* Disponibilidade para inicio imediat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6-02T11:57:29.257789437</meta:print-date>
    <meta:printed-by>PDF files</meta:printed-by>
    <dc:date>2026-06-02T12:42:41.395587270</dc:date>
    <meta:editing-duration>PT41M40S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1" meta:paragraph-count="28" meta:word-count="161" meta:character-count="1052" meta:non-whitespace-character-count="895"/>
  </office:meta>
</office:document-meta>
</file>